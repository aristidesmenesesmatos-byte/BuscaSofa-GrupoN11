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77000003B9CCA5B81E294AAE78.png" manifest:media-type="image/png"/>
  <manifest:file-entry manifest:full-path="Pictures/1000020100000760000003CD84749F79E1471A53.png" manifest:media-type="image/png"/>
  <manifest:file-entry manifest:full-path="Pictures/10000201000005BA000002496073F444F3B0AA48.png" manifest:media-type="image/png"/>
  <manifest:file-entry manifest:full-path="Pictures/100002010000077B0000037C6040FF4ECA6BDE88.png" manifest:media-type="image/png"/>
  <manifest:file-entry manifest:full-path="Pictures/100002010000076D00000395DC7F59282C531980.png" manifest:media-type="image/png"/>
  <manifest:file-entry manifest:full-path="Pictures/1000020100000762000003DA6BE6AA2BB422E2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0b6f"/>
    </style:style>
    <style:style style:name="P2" style:family="paragraph" style:parent-style-name="Standard">
      <style:text-properties officeooo:paragraph-rsid="0001bd2b"/>
    </style:style>
    <style:style style:name="P3" style:family="paragraph" style:parent-style-name="Standard">
      <style:text-properties officeooo:paragraph-rsid="0002151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Memoria del Proyecto: BuscaSofa - Grupo N11<text:line-break/><text:line-break/>## 1. Introducción<text:line-break/>BuscaSofa es una aplicación web MVP (Minimum Viable Product) desarrollada para la consulta de precios de combustible en España. La plataforma permite a los usuarios buscar estaciones de servicio, ver un resumen de precios a nivel nacional o por comunidades autónomas, y registrar sus perfiles.<text:line-break/><text:line-break/>El desarrollo se ha basado principalmente en la demostración de la aplicación rigurosa de metodologías ágiles de ingeniería de software, en concreto BDD (Behavior-Driven Development) y TDD (Test-Driven Development). La arquitectura técnica es una solución Full-Stack tradicional usando React 19 y Vite en el frontend, y Node.js con Express en el backend. <text:line-break/><text:line-break/>Se ha priorizado un diseño pragmático y orientado a resolver la funcionalidad solicitada sin incurrir en sobreingeniería, cumpliendo los objetivos académicos de la asignatura.<text:line-break/><text:line-break/>---<text:line-break/><text:line-break/>## 2. Metodología y Pruebas<text:line-break/>Dado que la validación y el testing conforman el pilar crítico del aseguramiento de la calidad de este proyecto, se ha invertido la mayor parte del esfuerzo en estabilizar el marco de pruebas y aplicar el ciclo **Red-Green-Refactor**. <text:line-break/><text:line-break/>### 2.1 BDD (Behavior-Driven Development)<text:line-break/>Para el desarrollo de la funcionalidad de *Cierre de Sesión (Logout)*, el primer paso fue la creación de un escenario de comportamiento escrito en lenguaje natural (Gherkin).<text:line-break/><text:line-break/>**Archivo: `cypress/e2e/features/logout.feature`**<text:line-break/>```gherkin<text:line-break/>Feature: Cierre de sesión<text:line-break/><text:line-break/> <text:s/>Scenario: El usuario autenticado cierra sesión<text:line-break/> <text:s text:c="3"/>Given el usuario ha iniciado sesión<text:line-break/> <text:s text:c="3"/>When el usuario hace clic en "Cerrar sesión"<text:line-break/> <text:s text:c="3"/>Then debería ver el enlace "Login"<text:line-break/> <text:s text:c="3"/>And debería ver el enlace "Registro"<text:line-break/> <text:s text:c="3"/>And no debería ver el botón "Cerrar sesión"<text:line-break/>```<text:line-break/><text:line-break/>Los "step definitions" de Cypress se enlazaron a estas frases para simular un inicio de sesión previo interactuando con el `localStorage` y la función `cy.intercept` para evitar dependencias inestables con el backend real, comprobando así el flujo completo desde la UI.<text:line-break/><text:line-break/></text:p>
      <text:section text:style-name="Sect1" text:name="Sección1">
        <text:p text:style-name="P1"><draw:frame draw:style-name="fr1" draw:name="Imagen1" text:anchor-type="paragraph" svg:width="17.59cm" svg:height="9.063cm" draw:z-index="0"><draw:image xlink:href="Pictures/1000020100000760000003CD84749F79E1471A53.png" xlink:type="simple" xlink:show="embed" xlink:actuate="onLoad" loext:mime-type="image/png"/></draw:frame><text:soft-page-break/></text:p>
      </text:section>
      <text:p text:style-name="P2"><text:line-break/><text:line-break/><text:line-break/>### 2.2 TDD (Test-Driven Development)<text:line-break/>Tras definir el comportamiento, se desarrolló la lógica aislada usando TDD y Jest.<text:line-break/><text:line-break/>**Fase RED:** <text:line-break/>Se escribieron las pruebas unitarias para la función encargada de destruir el token de sesión. Inicialmente, al ejecutar `npm test`, la prueba fallaba porque la función real no estaba codificada.<text:line-break/><text:line-break/>**Archivo: `src/auth/cerrarSesion.test.js`**<text:line-break/>```javascript<text:line-break/>import { cerrarSesion } from './cerrarSesion';<text:line-break/><text:line-break/>describe('cerrarSesion', () =&gt; {<text:line-break/> <text:s/>it('lanza TypeError si storage es null', () =&gt; {<text:line-break/> <text:s text:c="3"/>expect(() =&gt; cerrarSesion(null, jest.fn())).toThrow(TypeError);<text:line-break/> <text:s/>});<text:line-break/><text:line-break/> <text:s/>it('elimina el token y llama al callback con null', () =&gt; {<text:line-break/> <text:s text:c="3"/>const storage = { getItem: jest.fn(), setItem: jest.fn(), removeItem: jest.fn() };<text:line-break/> <text:s text:c="3"/>const callback = jest.fn();<text:line-break/> <text:s text:c="3"/>cerrarSesion(storage, callback);<text:line-break/> <text:s text:c="3"/>expect(storage.removeItem).toHaveBeenCalledWith('token');<text:line-break/> <text:s text:c="3"/>expect(callback).toHaveBeenCalledWith(null);<text:line-break/> <text:s/>});<text:line-break/>});<text:line-break/>```<text:line-break/><text:line-break/><text:soft-page-break/>**Fase GREEN:**<text:line-break/>Una vez definida la prueba, se codificó la función con el código mínimo para hacerla pasar:<text:line-break/>```javascript<text:line-break/>export function cerrarSesion(storage, actualizarUsuario) {<text:line-break/> <text:s/>if (!storage || typeof actualizarUsuario !== 'function') {<text:line-break/> <text:s text:c="3"/>throw new TypeError('dependencias de sesion invalidas');<text:line-break/> <text:s/>}<text:line-break/> <text:s/>storage.removeItem('token');<text:line-break/> <text:s/>actualizarUsuario(null);<text:line-break/>}<text:line-break/>```<text:line-break/><text:line-break/>**Fase REFACTOR:**<text:line-break/>Finalmente, se refactorizó el código de `App.jsx` y `Header.jsx` para integrar esta función. Al volver a ejecutar la suite de pruebas mediante la línea de comandos, todo se mantuvo en estado Verde confirmando la estabilización del código y componentes de React integrados.<text:line-break/><text:line-break/></text:p>
      <text:section text:style-name="Sect1" text:name="Sección2">
        <text:p text:style-name="P2"><draw:frame draw:style-name="fr2" draw:name="Imagen2" text:anchor-type="paragraph" svg:width="17.59cm" svg:height="7.017cm" draw:z-index="1"><draw:image xlink:href="Pictures/10000201000005BA000002496073F444F3B0AA48.png" xlink:type="simple" xlink:show="embed" xlink:actuate="onLoad" loext:mime-type="image/png"/></draw:frame></text:p>
      </text:section>
      <text:p text:style-name="P3"><text:line-break/><text:line-break/><text:line-break/><text:line-break/>## 3. Manual de Usuario<text:line-break/><text:line-break/>### Instalación y Ejecución Local<text:line-break/>1. Instalar dependencias mediante la terminal en el directorio raíz:<text:line-break/> <text:s text:c="2"/>`npm install`<text:line-break/>2. Arrancar el servidor local de desarrollo:<text:line-break/> <text:s text:c="2"/>`npm run dev`<text:line-break/>3. Acceder en el navegador a: `http://localhost:5173/`<text:line-break/><text:line-break/>### Funcionalidades principales<text:line-break/>- **Home / Resumen**: Al abrir la aplicación, se mostrará una tabla resumen con los precios medios <text:soft-page-break/>nacionales del Gasóleo A y Gasolina 95, y su desglose por comunidades autónomas.<text:line-break/>- **Registro y Login**: En la parte superior derecha se encuentran los botones para registrar un usuario nuevo y loguearse.<text:line-break/>- **Cierre de sesión**: Una vez autenticado (verás el mensaje "Bienvenido, usuario"), aparecerá el botón "Cerrar sesión". Al hacer clic, el token se borra y la aplicación retorna a la vista pública.<text:line-break/></text:p>
      <text:p text:style-name="P3"/>
      <text:section text:style-name="Sect1" text:name="Sección3">
        <text:p text:style-name="P3"><draw:frame draw:style-name="fr2" draw:name="Imagen3" text:anchor-type="paragraph" svg:width="17.59cm" svg:height="8.77cm" draw:z-index="2"><draw:image xlink:href="Pictures/1000020100000777000003B9CCA5B81E294AAE78.png" xlink:type="simple" xlink:show="embed" xlink:actuate="onLoad" loext:mime-type="image/png"/></draw:frame></text:p>
        <text:p text:style-name="P3"/>
        <text:p text:style-name="P3"><draw:frame draw:style-name="fr2" draw:name="Imagen4" text:anchor-type="paragraph" svg:width="17.59cm" svg:height="8.192cm" draw:z-index="3"><draw:image xlink:href="Pictures/100002010000077B0000037C6040FF4ECA6BDE88.png" xlink:type="simple" xlink:show="embed" xlink:actuate="onLoad" loext:mime-type="image/png"/></draw:frame></text:p>
        <text:p text:style-name="P3"/>
        <text:p text:style-name="P3"><draw:frame draw:style-name="fr1" draw:name="Imagen5" text:anchor-type="paragraph" svg:width="17.59cm" svg:height="8.484cm" draw:z-index="4"><draw:image xlink:href="Pictures/100002010000076D00000395DC7F59282C531980.png" xlink:type="simple" xlink:show="embed" xlink:actuate="onLoad" loext:mime-type="image/png"/></draw:frame><text:soft-page-break/></text:p>
        <text:p text:style-name="P3"><draw:frame draw:style-name="fr1" draw:name="Imagen6" text:anchor-type="paragraph" svg:width="17.59cm" svg:height="9.176cm" draw:z-index="5"><draw:image xlink:href="Pictures/1000020100000762000003DA6BE6AA2BB422E276.png" xlink:type="simple" xlink:show="embed" xlink:actuate="onLoad" loext:mime-type="image/png"/></draw:frame></text:p>
      </text:section>
      <text:p text:style-name="P3"/>
      <text:p text:style-name="P3"><text:line-break/><text:line-break/>---<text:line-break/><text:line-break/>## 4. Enlace al Repositorio<text:line-break/><text:line-break/>Todo el código fuente, histórico de versiones y recursos asociados a la práctica se encuentran disponibles en el repositorio proporcionado por el grupo:<text:line-break/><text:line-break/><text:soft-page-break/>**GitHub URL:** https://github.com/aristidesmenesesmatos-byte/BuscaSofa-GrupoN11<text:line-break/><text:line-break/>*(Nota: En la rama `main` se encuentra el código estable que incluye todas las implementaciones mencionadas).*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6-06-06T20:25:54.637000000</dc:date>
    <meta:editing-duration>PT25M6S</meta:editing-duration>
    <meta:editing-cycles>5</meta:editing-cycles>
    <meta:document-statistic meta:table-count="0" meta:image-count="6" meta:object-count="0" meta:page-count="6" meta:paragraph-count="4" meta:word-count="667" meta:character-count="4811" meta:non-whitespace-character-count="4037"/>
  </office:meta>
</office:document-meta>
</file>